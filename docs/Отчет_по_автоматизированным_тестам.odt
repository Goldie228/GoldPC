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http://www.w3.org/1999/XSL/Format" xmlns:xlink="http://www.w3.org/1999/xlink" office:version="1.2">
  <office:automatic-styles>
    <style:page-layout style:name="GoldPC-PL">
      <style:page-layout-properties fo:page-width="21.0cm" fo:page-height="29.7cm" fo:margin-top="2.0cm" fo:margin-bottom="2.0cm" fo:margin-left="3.0cm" fo:margin-right="1.5cm" style:print-orientation="portrait"/>
    </style:page-layout>
    <style:style style:name="Default" style:family="paragraph" style:default-outline-level="-1">
      <style:paragraph-properties fo:text-align="justify" fo:margin-top="0" fo:margin-bottom="0" style:line-height="1" style:line-spacing="1"/>
      <style:text-properties style:font-name="Times New Roman" fo:font-size="14pt" fo:color="#000000"/>
    </style:style>
    <style:style style:name="H1" style:family="paragraph" style:parent-style-name="Default" style:default-outline-level="-1">
      <style:paragraph-properties fo:text-align="center" fo:margin-top="0.7cm" fo:margin-bottom="0.3cm"/>
      <style:text-properties style:font-name="Times New Roman" fo:font-size="16pt" fo:color="#000000"/>
    </style:style>
    <style:style style:name="H2" style:family="paragraph" style:parent-style-name="Default" style:default-outline-level="-1">
      <style:paragraph-properties fo:text-align="left" fo:margin-top="0.7cm" fo:margin-bottom="0.3cm"/>
      <style:text-properties style:font-name="Times New Roman" fo:font-size="14pt" fo:color="#000000"/>
    </style:style>
    <style:style style:name="Title" style:family="paragraph" style:parent-style-name="Default" style:default-outline-level="-1">
      <style:paragraph-properties fo:text-align="center" fo:margin-top="0.5cm" fo:margin-bottom="0.3cm"/>
      <style:text-properties style:font-name="Times New Roman" fo:font-size="16pt" fo:color="#000000"/>
    </style:style>
    <style:style style:name="Cell" style:family="paragraph" style:parent-style-name="Default" style:default-outline-level="-1">
      <style:paragraph-properties fo:text-align="left" fo:margin-top="0" fo:margin-bottom="0" fo:margin-left="0.2cm"/>
      <style:text-properties style:font-name="Times New Roman" fo:font-size="12pt"/>
    </style:style>
    <style:style style:name="CellH" style:family="paragraph" style:parent-style-name="Default" style:default-outline-level="-1">
      <style:paragraph-properties fo:text-align="center" fo:margin-top="0" fo:margin-bottom="0" fo:margin-left="0.2cm"/>
      <style:text-properties style:font-name="Times New Roman" fo:font-size="12pt"/>
    </style:style>
    <style:style style:name="T1" style:family="table">
      <style:table-properties fo:border="0.05pt solid #000000" style:table-layout="fixed"/>
    </style:style>
    <style:style style:name="C1" style:family="table-column">
      <style:table-column-properties fo:break-before="auto" style:column-width="auto"/>
    </style:style>
  </office:automatic-styles>
  <office:body>
    <office:text>
      <text:p text:style-name="Title">ГОСУДАРСТВЕННОЕ УЧРЕЖДЕНИЕ ОБРАЗОВАНИЯ</text:p>
      <text:p text:style-name="Title">"МИНСКИЙ ГОСУДАРСТВЕННЫЙ КОЛЛЕДЖ</text:p>
      <text:p text:style-name="Title">ЭЛЕКТРОНИКИ"</text:p>
      <text:p text:style-name="Title">ОТЧЁТ</text:p>
      <text:p text:style-name="Title">ПО АВТОМАТИЗИРОВАННЫМ ТЕСТАМ</text:p>
      <text:p text:style-name="Title">ПРОЕКТА "GoldPC"</text:p>
      <text:p text:style-name="Title">2026</text:p>
      <text:p text:style-name="H1">СОДЕРЖАНИЕ</text:p>
      <text:p text:style-name="Default">1. Назначение автоматизированных тестов</text:p>
      <text:p text:style-name="Default">2. Средства автоматизации</text:p>
      <text:p text:style-name="Default">3. Структура тестовой инфраструктуры</text:p>
      <text:p text:style-name="Default">4. Описание тестовых наборов</text:p>
      <text:p text:style-name="Default">    4.1. Модульные тесты (Unit Tests)</text:p>
      <text:p text:style-name="Default">    4.2. Тесты совместимости компонентов</text:p>
      <text:p text:style-name="Default">    4.3. Архитектурные тесты</text:p>
      <text:p text:style-name="Default">    4.4. Интеграционные тесты</text:p>
      <text:p text:style-name="Default">    4.5. Контрактные тесты</text:p>
      <text:p text:style-name="Default">5. Стратегия тестирования</text:p>
      <text:p text:style-name="Default">6. Покрытие кода</text:p>
      <text:p text:style-name="Default">7. Выводы</text:p>
      <text:p text:style-name="Default"><text:s text:c="1"/></text:p>
      <text:p text:style-name="H1">1. Назначение автоматизированных тестов</text:p>
      <text:p text:style-name="Default">Автоматизированные тесты в проекте "GoldPC" выполняют следующие функции:</text:p>
      <text:p text:style-name="Default">обеспечение корректности бизнес-логики каждого микросервиса;</text:p>
      <text:p text:style-name="Default">предотвращение регрессий при внесении изменений в код;</text:p>
      <text:p text:style-name="Default">валидация архитектурных ограничений (отсутствие циклических зависимостей, соблюдение принципа Dependency Inversion);</text:p>
      <text:p text:style-name="Default">проверка совместимости компонентов ПК (сокет, тип памяти, мощность БП);</text:p>
      <text:p text:style-name="Default">верификация контрактов между провайдером (API) и потребителем (фронтенд);</text:p>
      <text:p text:style-name="Default">обеспечение изоляции тестов друг от друга через in-memory базы данных.</text:p>
      <text:p text:style-name="Default"><text:s text:c="1"/></text:p>
      <text:p text:style-name="H1">2. Средства автоматизации</text:p>
      <table:table table:name="T1" table:style-name="T1" table:column-count="2">
        <table:table-row>
          <table:table-cell table:style-name="C1">
            <text:p text:style-name="CellH">Инструмент</text:p>
          </table:table-cell>
          <table:table-cell table:style-name="C1">
            <text:p text:style-name="CellH">Назначение</text:p>
          </table:table-cell>
        </table:table-row>
        <table:table-row>
          <table:table-cell table:style-name="C1">
            <text:p text:style-name="Cell">xUnit</text:p>
          </table:table-cell>
          <table:table-cell table:style-name="C1">
            <text:p text:style-name="Cell">Фреймворк для написания и запуска тестов .NET</text:p>
          </table:table-cell>
        </table:table-row>
        <table:table-row>
          <table:table-cell table:style-name="C1">
            <text:p text:style-name="Cell">FluentAssertions</text:p>
          </table:table-cell>
          <table:table-cell table:style-name="C1">
            <text:p text:style-name="Cell">Читаемые утверждения (assertions)</text:p>
          </table:table-cell>
        </table:table-row>
        <table:table-row>
          <table:table-cell table:style-name="C1">
            <text:p text:style-name="Cell">Moq</text:p>
          </table:table-cell>
          <table:table-cell table:style-name="C1">
            <text:p text:style-name="Cell">Создание мок-объектов для подмены зависимостей</text:p>
          </table:table-cell>
        </table:table-row>
        <table:table-row>
          <table:table-cell table:style-name="C1">
            <text:p text:style-name="Cell">AutoFixture</text:p>
          </table:table-cell>
          <table:table-cell table:style-name="C1">
            <text:p text:style-name="Cell">Автоматическая генерация тестовых данных</text:p>
          </table:table-cell>
        </table:table-row>
        <table:table-row>
          <table:table-cell table:style-name="C1">
            <text:p text:style-name="Cell">EF Core InMemory</text:p>
          </table:table-cell>
          <table:table-cell table:style-name="C1">
            <text:p text:style-name="Cell">In-memory провайдер БД для изоляции тестов</text:p>
          </table:table-cell>
        </table:table-row>
        <table:table-row>
          <table:table-cell table:style-name="C1">
            <text:p text:style-name="Cell">WebApplicationFactory</text:p>
          </table:table-cell>
          <table:table-cell table:style-name="C1">
            <text:p text:style-name="Cell">Тестирование HTTP-эндпоинтов без сервера</text:p>
          </table:table-cell>
        </table:table-row>
        <table:table-row>
          <table:table-cell table:style-name="C1">
            <text:p text:style-name="Cell">PactNet</text:p>
          </table:table-cell>
          <table:table-cell table:style-name="C1">
            <text:p text:style-name="Cell">Consumer-driven контрактное тестирование</text:p>
          </table:table-cell>
        </table:table-row>
        <table:table-row>
          <table:table-cell table:style-name="C1">
            <text:p text:style-name="Cell">NetArchTest.Rules</text:p>
          </table:table-cell>
          <table:table-cell table:style-name="C1">
            <text:p text:style-name="Cell">Проверка архитектурных ограничений</text:p>
          </table:table-cell>
        </table:table-row>
        <table:table-row>
          <table:table-cell table:style-name="C1">
            <text:p text:style-name="Cell">Bogus</text:p>
          </table:table-cell>
          <table:table-cell table:style-name="C1">
            <text:p text:style-name="Cell">Генерация фейковых данных (Fakers)</text:p>
          </table:table-cell>
        </table:table-row>
      </table:table>
      <text:p text:style-name="Default"><text:s text:c="1"/></text:p>
      <text:p text:style-name="H1">3. Структура тестовой инфраструктуры</text:p>
      <text:p text:style-name="Default">Тестовая инфраструктура проекта организована в виде отдельных тестовых проектов:</text:p>
      <table:table table:name="T1" table:style-name="T1" table:column-count="3">
        <table:table-row>
          <table:table-cell table:style-name="C1">
            <text:p text:style-name="CellH">Тестовый проект</text:p>
          </table:table-cell>
          <table:table-cell table:style-name="C1">
            <text:p text:style-name="CellH">Тип тестов</text:p>
          </table:table-cell>
          <table:table-cell table:style-name="C1">
            <text:p text:style-name="CellH">Описание</text:p>
          </table:table-cell>
        </table:table-row>
        <table:table-row>
          <table:table-cell table:style-name="C1">
            <text:p text:style-name="Cell">AuthService.Tests</text:p>
          </table:table-cell>
          <table:table-cell table:style-name="C1">
            <text:p text:style-name="Cell">Unit</text:p>
          </table:table-cell>
          <table:table-cell table:style-name="C1">
            <text:p text:style-name="Cell">Модульные тесты сервиса аутентификации</text:p>
          </table:table-cell>
        </table:table-row>
        <table:table-row>
          <table:table-cell table:style-name="C1">
            <text:p text:style-name="Cell">GoldPC.UnitTests</text:p>
          </table:table-cell>
          <table:table-cell table:style-name="C1">
            <text:p text:style-name="Cell">Unit</text:p>
          </table:table-cell>
          <table:table-cell table:style-name="C1">
            <text:p text:style-name="Cell">Модульные тесты каталога, заказов, совместимости</text:p>
          </table:table-cell>
        </table:table-row>
        <table:table-row>
          <table:table-cell table:style-name="C1">
            <text:p text:style-name="Cell">OrdersService.Tests</text:p>
          </table:table-cell>
          <table:table-cell table:style-name="C1">
            <text:p text:style-name="Cell">Unit</text:p>
          </table:table-cell>
          <table:table-cell table:style-name="C1">
            <text:p text:style-name="Cell">Модульные тесты сервиса заказов</text:p>
          </table:table-cell>
        </table:table-row>
        <table:table-row>
          <table:table-cell table:style-name="C1">
            <text:p text:style-name="Cell">ServicesService.Tests</text:p>
          </table:table-cell>
          <table:table-cell table:style-name="C1">
            <text:p text:style-name="Cell">Unit</text:p>
          </table:table-cell>
          <table:table-cell table:style-name="C1">
            <text:p text:style-name="Cell">Модульные тесты сервисных заявок</text:p>
          </table:table-cell>
        </table:table-row>
        <table:table-row>
          <table:table-cell table:style-name="C1">
            <text:p text:style-name="Cell">WarrantyService.Tests</text:p>
          </table:table-cell>
          <table:table-cell table:style-name="C1">
            <text:p text:style-name="Cell">Unit</text:p>
          </table:table-cell>
          <table:table-cell table:style-name="C1">
            <text:p text:style-name="Cell">Модульные тесты гарантийного обслуживания</text:p>
          </table:table-cell>
        </table:table-row>
        <table:table-row>
          <table:table-cell table:style-name="C1">
            <text:p text:style-name="Cell">PCBuilderService.Tests</text:p>
          </table:table-cell>
          <table:table-cell table:style-name="C1">
            <text:p text:style-name="Cell">Unit</text:p>
          </table:table-cell>
          <table:table-cell table:style-name="C1">
            <text:p text:style-name="Cell">Тесты совместимости и конфигурации сборки</text:p>
          </table:table-cell>
        </table:table-row>
        <table:table-row>
          <table:table-cell table:style-name="C1">
            <text:p text:style-name="Cell">ArchitectureTests</text:p>
          </table:table-cell>
          <table:table-cell table:style-name="C1">
            <text:p text:style-name="Cell">Arch</text:p>
          </table:table-cell>
          <table:table-cell table:style-name="C1">
            <text:p text:style-name="Cell">Проверка архитектурных ограничений</text:p>
          </table:table-cell>
        </table:table-row>
        <table:table-row>
          <table:table-cell table:style-name="C1">
            <text:p text:style-name="Cell">GoldPC.IntegrationTests</text:p>
          </table:table-cell>
          <table:table-cell table:style-name="C1">
            <text:p text:style-name="Cell">Integration</text:p>
          </table:table-cell>
          <table:table-cell table:style-name="C1">
            <text:p text:style-name="Cell">Интеграционные тесты API</text:p>
          </table:table-cell>
        </table:table-row>
        <table:table-row>
          <table:table-cell table:style-name="C1">
            <text:p text:style-name="Cell">GoldPC.ContractTests</text:p>
          </table:table-cell>
          <table:table-cell table:style-name="C1">
            <text:p text:style-name="Cell">Contract</text:p>
          </table:table-cell>
          <table:table-cell table:style-name="C1">
            <text:p text:style-name="Cell">Контрактные тесты (Pact)</text:p>
          </table:table-cell>
        </table:table-row>
      </table:table>
      <text:p text:style-name="Default"><text:s text:c="1"/></text:p>
      <text:p text:style-name="H1">4. Описание тестовых наборов</text:p>
      <text:p text:style-name="H2">4.1. Модульные тесты (Unit Tests)</text:p>
      <text:p text:style-name="Default">Модульные тесты проверяют отдельные методы и классы в изоляции. Внешние зависимости подменяются мок-объектами (Moq), а база данных заменяется InMemory провайдером EF Core.</text:p>
      <text:p text:style-name="Default">Ключевые особенности реализации:</text:p>
      <text:p text:style-name="Default">каждый тестовый класс создаёт свежую in-memory БД (Guid.NewGuid() как имя) для полной изоляции;</text:p>
      <text:p text:style-name="Default">используется паттерн Arrange-Act-Assert (AAA) для структурирования тестов;</text:p>
      <text:p text:style-name="Default">Fakers (Bogus) применяются для генерации тестовых данных (ProductFaker, OrderFaker, UserFaker);</text:p>
      <text:p text:style-name="Default">параметризированные тесты ([Theory] + [InlineData]) для проверки различных входных данных;</text:p>
      <text:p text:style-name="Default">мок-объекты настраиваются через Setup/Returns и проверяются через Verify.</text:p>
      <text:p text:style-name="Default">Примеры покрываемых сценариев для OrderService:</text:p>
      <text:p text:style-name="Default">создание заказа при наличии товаров на складе;</text:p>
      <text:p text:style-name="Default">ошибка при недостаточном количестве товаров на складе;</text:p>
      <text:p text:style-name="Default">ошибка при несуществующем товаре;</text:p>
      <text:p text:style-name="Default">валидация пустого списка товаров и некорректного количества;</text:p>
      <text:p text:style-name="Default">получение заказа по ID (существующий, несуществующий, чужой);</text:p>
      <text:p text:style-name="Default">валидные и невалидные переходы статусов;</text:p>
      <text:p text:style-name="Default">отмена заказа с возвратом товаров на склад;</text:p>
      <text:p text:style-name="Default">отмена завершённого заказа (ошибка);</text:p>
      <text:p text:style-name="Default">успешная и неуспешная обработка платежей;</text:p>
      <text:p text:style-name="Default">фильтрация заказов по пользователю и статусу.</text:p>
      <text:p text:style-name="Default"><text:s text:c="1"/></text:p>
      <text:p text:style-name="H2">4.2. Тесты совместимости компонентов</text:p>
      <text:p text:style-name="Default">Сервис PCBuilderService содержит развитую систему проверки совместимости компонентов ПК. Автоматизированные тесты покрывают 7 основных правил:</text:p>
      <table:table table:name="T1" table:style-name="T1" table:column-count="3">
        <table:table-row>
          <table:table-cell table:style-name="C1">
            <text:p text:style-name="CellH">Правило</text:p>
          </table:table-cell>
          <table:table-cell table:style-name="C1">
            <text:p text:style-name="CellH">Описание</text:p>
          </table:table-cell>
          <table:table-cell table:style-name="C1">
            <text:p text:style-name="CellH">Тестов</text:p>
          </table:table-cell>
        </table:table-row>
        <table:table-row>
          <table:table-cell table:style-name="C1">
            <text:p text:style-name="Cell">1. CPU &lt;-&gt; Motherboard Socket</text:p>
          </table:table-cell>
          <table:table-cell table:style-name="C1">
            <text:p text:style-name="Cell">Сокет процессора должен соответствовать сокету материнской платы. Регистронезависимое сравнение.</text:p>
          </table:table-cell>
          <table:table-cell table:style-name="C1">
            <text:p text:style-name="Cell">4</text:p>
          </table:table-cell>
        </table:table-row>
        <table:table-row>
          <table:table-cell table:style-name="C1">
            <text:p text:style-name="Cell">2. RAM &lt;-&gt; Motherboard MemoryType</text:p>
          </table:table-cell>
          <table:table-cell table:style-name="C1">
            <text:p text:style-name="Cell">Тип памяти (DDR4/DDR5) должен поддерживаться материнской платой.</text:p>
          </table:table-cell>
          <table:table-cell table:style-name="C1">
            <text:p text:style-name="Cell">4</text:p>
          </table:table-cell>
        </table:table-row>
        <table:table-row>
          <table:table-cell table:style-name="C1">
            <text:p text:style-name="Cell">3. Cooler &lt;-&gt; CPU SupportedSockets</text:p>
          </table:table-cell>
          <table:table-cell table:style-name="C1">
            <text:p text:style-name="Cell">Кулер должен поддерживать сокет процессора. Проверка TDP кулера.</text:p>
          </table:table-cell>
          <table:table-cell table:style-name="C1">
            <text:p text:style-name="Cell">3</text:p>
          </table:table-cell>
        </table:table-row>
        <table:table-row>
          <table:table-cell table:style-name="C1">
            <text:p text:style-name="Cell">4. PSU &lt;-&gt; Configuration Power</text:p>
          </table:table-cell>
          <table:table-cell table:style-name="C1">
            <text:p text:style-name="Cell">Блок питания: CPU + GPU + 50W с запасом 40%. Расчёт рекомендованной мощности.</text:p>
          </table:table-cell>
          <table:table-cell table:style-name="C1">
            <text:p text:style-name="Cell">5</text:p>
          </table:table-cell>
        </table:table-row>
        <table:table-row>
          <table:table-cell table:style-name="C1">
            <text:p text:style-name="Cell">5. Bottleneck Detection</text:p>
          </table:table-cell>
          <table:table-cell table:style-name="C1">
            <text:p text:style-name="Cell">Обнаружение bottleneck при ratio CPU/GPU &gt; 2.0.</text:p>
          </table:table-cell>
          <table:table-cell table:style-name="C1">
            <text:p text:style-name="Cell">1</text:p>
          </table:table-cell>
        </table:table-row>
        <table:table-row>
          <table:table-cell table:style-name="C1">
            <text:p text:style-name="Cell">6. GPU &lt;-&gt; Case Length</text:p>
          </table:table-cell>
          <table:table-cell table:style-name="C1">
            <text:p text:style-name="Cell">Длина видеокарты не превышает максимум в корпусе.</text:p>
          </table:table-cell>
          <table:table-cell table:style-name="C1">
            <text:p text:style-name="Cell">3</text:p>
          </table:table-cell>
        </table:table-row>
        <table:table-row>
          <table:table-cell table:style-name="C1">
            <text:p text:style-name="Cell">7. Cooler &lt;-&gt; Case Height</text:p>
          </table:table-cell>
          <table:table-cell table:style-name="C1">
            <text:p text:style-name="Cell">Высота кулера не превышает максимум в корпусе.</text:p>
          </table:table-cell>
          <table:table-cell table:style-name="C1">
            <text:p text:style-name="Cell">3</text:p>
          </table:table-cell>
        </table:table-row>
      </table:table>
      <text:p text:style-name="Default">Всего тестов совместимости: 23 (включая комбинированные сценарии).</text:p>
      <text:p text:style-name="Default"><text:s text:c="1"/></text:p>
      <text:p text:style-name="H2">4.3. Архитектурные тесты</text:p>
      <text:p text:style-name="Default">Архитектурные тесты автоматически проверяют соблюдение принципов Clean Architecture. Используется NetArchTest.Rules для статического анализа зависимостей между сборками.</text:p>
      <text:p text:style-name="Default">Проверяемые ограничения:</text:p>
      <text:p text:style-name="Default">отсутствие циклических зависимостей (алгоритм DFS по графу зависимостей);</text:p>
      <text:p text:style-name="Default">слой Core (Models/Entities) не зависит от Infrastructure (Repositories, EF Core);</text:p>
      <text:p text:style-name="Default">контроллеры не напрямую зависимы от репозиториев;</text:p>
      <text:p text:style-name="Default">все сервисы реализуют хотя бы один интерфейс (принцип Dependency Inversion);</text:p>
      <text:p text:style-name="Default">интерфейсы сервисов следуют naming convention I{ServiceName};</text:p>
      <text:p text:style-name="Default">сущности SharedKernel -- sealed или abstract;</text:p>
      <text:p text:style-name="Default">репозитории реализуют интерфейсы I{RepositoryName};</text:p>
      <text:p text:style-name="Default">контроллеры находятся в пространстве имён Controllers.</text:p>
      <text:p text:style-name="Default">Все 11 архитектурных тестов проходят успешно, что подтверждает соответствие кодовой базы принципам чистой архитектуры.</text:p>
      <text:p text:style-name="Default"><text:s text:c="1"/></text:p>
      <text:p text:style-name="H2">4.4. Интеграционные тесты</text:p>
      <text:p text:style-name="Default">Интеграционные тесты проверяют взаимодействие нескольких компонентов внутри одного процесса. Используются WebApplicationFactory для запуска тестового HTTP-сервера и InMemory БД.</text:p>
      <text:p text:style-name="Default">Ключевые интеграционные тесты:</text:p>
      <text:p text:style-name="Default">CatalogApiTests -- GET /api/v1/catalog/products: проверка возврата статуса 200 OK и непустого тела ответа с MockCatalogService;</text:p>
      <text:p text:style-name="Default">ProductsApiTests -- проверка доступности БД через DatabaseFixture, сброс данных между тестами, изоляция тестов;</text:p>
      <text:p text:style-name="Default">OrderStockReservationTests -- POST /api/v1/orders: проверка, что создание заказа вызывает gRPC-запрос ReserveStock к CatalogService для резервирования товаров.</text:p>
      <text:p text:style-name="Default">Для межсервисного взаимодействия используется gRPC. В тестах мокируется CatalogGrpc.CatalogGrpcClient для изоляции от реального CatalogService.</text:p>
      <text:p text:style-name="Default"><text:s text:c="1"/></text:p>
      <text:p text:style-name="H2">4.5. Контрактные тесты</text:p>
      <text:p text:style-name="Default">Контрактные тесты используют подход Consumer-Driven Contracts (CDC) с библиотекой PactNet. Провайдер (Catalog API) проверяется на соответствие контракту, созданному потребителем (Frontend).</text:p>
      <text:p text:style-name="Default">Процесс верификации контракта:</text:p>
      <text:p text:style-name="Default">1. Фронтенд (consumer) описывает ожидаемое поведение API в Pact-файле;</text:p>
      <text:p text:style-name="Default">2. Pact-файл сохраняется (локально или в Pact Broker);</text:p>
      <text:p text:style-name="Default">3. Бэкенд (provider) запускает PactVerifier с тестовым сервером;</text:p>
      <text:p text:style-name="Default">4. Верификатор отправляет запросы, описанные в контракте;</text:p>
      <text:p text:style-name="Default">5. Проверяется соответствие ответов ожиданиям потребителя.</text:p>
      <text:p text:style-name="Default">Тест VerifyPactWithFrontend_ShouldSucceed выполняет верификацию контракта GoldPC-Catalog-API с GoldPC-Frontend. Для CI/CD доступна опциональная интеграция с Pact Broker.</text:p>
      <text:p text:style-name="Default"><text:s text:c="1"/></text:p>
      <text:p text:style-name="H1">5. Стратегия тестирования</text:p>
      <text:p text:style-name="Default">Тестовая стратегия проекта основана на "Треугольнике тестирования":</text:p>
      <table:table table:name="T1" table:style-name="T1" table:column-count="4">
        <table:table-row>
          <table:table-cell table:style-name="C1">
            <text:p text:style-name="CellH">Уровень</text:p>
          </table:table-cell>
          <table:table-cell table:style-name="C1">
            <text:p text:style-name="CellH">Тип тестов</text:p>
          </table:table-cell>
          <table:table-cell table:style-name="C1">
            <text:p text:style-name="CellH">Цель</text:p>
          </table:table-cell>
          <table:table-cell table:style-name="C1">
            <text:p text:style-name="CellH">Количество</text:p>
          </table:table-cell>
        </table:table-row>
        <table:table-row>
          <table:table-cell table:style-name="C1">
            <text:p text:style-name="Cell">Нижний</text:p>
          </table:table-cell>
          <table:table-cell table:style-name="C1">
            <text:p text:style-name="Cell">Unit Tests</text:p>
          </table:table-cell>
          <table:table-cell table:style-name="C1">
            <text:p text:style-name="Cell">Проверка отдельных методов в изоляции</text:p>
          </table:table-cell>
          <table:table-cell table:style-name="C1">
            <text:p text:style-name="Cell">45 тестов</text:p>
          </table:table-cell>
        </table:table-row>
        <table:table-row>
          <table:table-cell table:style-name="C1">
            <text:p text:style-name="Cell">Средний</text:p>
          </table:table-cell>
          <table:table-cell table:style-name="C1">
            <text:p text:style-name="Cell">Integration Tests</text:p>
          </table:table-cell>
          <table:table-cell table:style-name="C1">
            <text:p text:style-name="Cell">Проверка взаимодействия компонентов</text:p>
          </table:table-cell>
          <table:table-cell table:style-name="C1">
            <text:p text:style-name="Cell">7 тестов</text:p>
          </table:table-cell>
        </table:table-row>
        <table:table-row>
          <table:table-cell table:style-name="C1">
            <text:p text:style-name="Cell">Верхний</text:p>
          </table:table-cell>
          <table:table-cell table:style-name="C1">
            <text:p text:style-name="Cell">Contract Tests</text:p>
          </table:table-cell>
          <table:table-cell table:style-name="C1">
            <text:p text:style-name="Cell">Верификация контрактов API</text:p>
          </table:table-cell>
          <table:table-cell table:style-name="C1">
            <text:p text:style-name="Cell">1 тест</text:p>
          </table:table-cell>
        </table:table-row>
        <table:table-row>
          <table:table-cell table:style-name="C1">
            <text:p text:style-name="Cell">Архитектура</text:p>
          </table:table-cell>
          <table:table-cell table:style-name="C1">
            <text:p text:style-name="Cell">Architecture Tests</text:p>
          </table:table-cell>
          <table:table-cell table:style-name="C1">
            <text:p text:style-name="Cell">Проверка структуры кодовой базы</text:p>
          </table:table-cell>
          <table:table-cell table:style-name="C1">
            <text:p text:style-name="Cell">11 тестов</text:p>
          </table:table-cell>
        </table:table-row>
      </table:table>
      <text:p text:style-name="Default">Принципы тестирования в проекте:</text:p>
      <text:p text:style-name="Default">Test Isolation -- каждый тест работает с собственной in-memory БД;</text:p>
      <text:p text:style-name="Default">FIRST Principles -- Fast, Independent, Repeatable, Self-validating, Timely;</text:p>
      <text:p text:style-name="Default">AAA Pattern -- Arrange (подготовка), Act (действие), Assert (проверка);</text:p>
      <text:p text:style-name="Default">Mock External Dependencies -- внешние сервисы (gRPC, email, payment) заменяются моками;</text:p>
      <text:p text:style-name="Default">Theory + InlineData -- параметризированные тесты для различных входных данных.</text:p>
      <text:p text:style-name="Default"><text:s text:c="1"/></text:p>
      <text:p text:style-name="H1">6. Покрытие кода</text:p>
      <text:p text:style-name="Default">В таблице представлено покрытие тестами по микросервисам:</text:p>
      <table:table table:name="T1" table:style-name="T1" table:column-count="5">
        <table:table-row>
          <table:table-cell table:style-name="C1">
            <text:p text:style-name="CellH">Микросервис</text:p>
          </table:table-cell>
          <table:table-cell table:style-name="C1">
            <text:p text:style-name="CellH">Unit</text:p>
          </table:table-cell>
          <table:table-cell table:style-name="C1">
            <text:p text:style-name="CellH">Integration</text:p>
          </table:table-cell>
          <table:table-cell table:style-name="C1">
            <text:p text:style-name="CellH">Contract</text:p>
          </table:table-cell>
          <table:table-cell table:style-name="C1">
            <text:p text:style-name="CellH">Всего</text:p>
          </table:table-cell>
        </table:table-row>
        <table:table-row>
          <table:table-cell table:style-name="C1">
            <text:p text:style-name="Cell">AuthService</text:p>
          </table:table-cell>
          <table:table-cell table:style-name="C1">
            <text:p text:style-name="Cell">6</text:p>
          </table:table-cell>
          <table:table-cell table:style-name="C1">
            <text:p text:style-name="Cell">0</text:p>
          </table:table-cell>
          <table:table-cell table:style-name="C1">
            <text:p text:style-name="Cell">0</text:p>
          </table:table-cell>
          <table:table-cell table:style-name="C1">
            <text:p text:style-name="Cell">6</text:p>
          </table:table-cell>
        </table:table-row>
        <table:table-row>
          <table:table-cell table:style-name="C1">
            <text:p text:style-name="Cell">CatalogService</text:p>
          </table:table-cell>
          <table:table-cell table:style-name="C1">
            <text:p text:style-name="Cell">24</text:p>
          </table:table-cell>
          <table:table-cell table:style-name="C1">
            <text:p text:style-name="Cell">3</text:p>
          </table:table-cell>
          <table:table-cell table:style-name="C1">
            <text:p text:style-name="Cell">1</text:p>
          </table:table-cell>
          <table:table-cell table:style-name="C1">
            <text:p text:style-name="Cell">28</text:p>
          </table:table-cell>
        </table:table-row>
        <table:table-row>
          <table:table-cell table:style-name="C1">
            <text:p text:style-name="Cell">OrdersService</text:p>
          </table:table-cell>
          <table:table-cell table:style-name="C1">
            <text:p text:style-name="Cell">5</text:p>
          </table:table-cell>
          <table:table-cell table:style-name="C1">
            <text:p text:style-name="Cell">1</text:p>
          </table:table-cell>
          <table:table-cell table:style-name="C1">
            <text:p text:style-name="Cell">0</text:p>
          </table:table-cell>
          <table:table-cell table:style-name="C1">
            <text:p text:style-name="Cell">6</text:p>
          </table:table-cell>
        </table:table-row>
        <table:table-row>
          <table:table-cell table:style-name="C1">
            <text:p text:style-name="Cell">ServicesService</text:p>
          </table:table-cell>
          <table:table-cell table:style-name="C1">
            <text:p text:style-name="Cell">4</text:p>
          </table:table-cell>
          <table:table-cell table:style-name="C1">
            <text:p text:style-name="Cell">0</text:p>
          </table:table-cell>
          <table:table-cell table:style-name="C1">
            <text:p text:style-name="Cell">0</text:p>
          </table:table-cell>
          <table:table-cell table:style-name="C1">
            <text:p text:style-name="Cell">4</text:p>
          </table:table-cell>
        </table:table-row>
        <table:table-row>
          <table:table-cell table:style-name="C1">
            <text:p text:style-name="Cell">WarrantyService</text:p>
          </table:table-cell>
          <table:table-cell table:style-name="C1">
            <text:p text:style-name="Cell">5</text:p>
          </table:table-cell>
          <table:table-cell table:style-name="C1">
            <text:p text:style-name="Cell">0</text:p>
          </table:table-cell>
          <table:table-cell table:style-name="C1">
            <text:p text:style-name="Cell">0</text:p>
          </table:table-cell>
          <table:table-cell table:style-name="C1">
            <text:p text:style-name="Cell">5</text:p>
          </table:table-cell>
        </table:table-row>
        <table:table-row>
          <table:table-cell table:style-name="C1">
            <text:p text:style-name="Cell">PCBuilderService</text:p>
          </table:table-cell>
          <table:table-cell table:style-name="C1">
            <text:p text:style-name="Cell">30</text:p>
          </table:table-cell>
          <table:table-cell table:style-name="C1">
            <text:p text:style-name="Cell">0</text:p>
          </table:table-cell>
          <table:table-cell table:style-name="C1">
            <text:p text:style-name="Cell">0</text:p>
          </table:table-cell>
          <table:table-cell table:style-name="C1">
            <text:p text:style-name="Cell">30</text:p>
          </table:table-cell>
        </table:table-row>
        <table:table-row>
          <table:table-cell table:style-name="C1">
            <text:p text:style-name="Cell">Architecture</text:p>
          </table:table-cell>
          <table:table-cell table:style-name="C1">
            <text:p text:style-name="Cell">11</text:p>
          </table:table-cell>
          <table:table-cell table:style-name="C1">
            <text:p text:style-name="Cell">0</text:p>
          </table:table-cell>
          <table:table-cell table:style-name="C1">
            <text:p text:style-name="Cell">0</text:p>
          </table:table-cell>
          <table:table-cell table:style-name="C1">
            <text:p text:style-name="Cell">11</text:p>
          </table:table-cell>
        </table:table-row>
        <table:table-row>
          <table:table-cell table:style-name="C1">
            <text:p text:style-name="Cell">ИТОГО</text:p>
          </table:table-cell>
          <table:table-cell table:style-name="C1">
            <text:p text:style-name="Cell">85</text:p>
          </table:table-cell>
          <table:table-cell table:style-name="C1">
            <text:p text:style-name="Cell">4</text:p>
          </table:table-cell>
          <table:table-cell table:style-name="C1">
            <text:p text:style-name="Cell">1</text:p>
          </table:table-cell>
          <table:table-cell table:style-name="C1">
            <text:p text:style-name="Cell">90</text:p>
          </table:table-cell>
        </table:table-row>
      </table:table>
      <text:p text:style-name="Default">Примечание: параметризированные тесты ([Theory]) считаются как один тестовый метод с несколькими case. Общее число индивидуальных проверок (case) составляет более 150.</text:p>
      <text:p text:style-name="Default"><text:s text:c="1"/></text:p>
      <text:p text:style-name="H1">7. Выводы</text:p>
      <text:p text:style-name="Default">Автоматизированная тестовая инфраструктура проекта "GoldPC" обеспечивает высокий уровень доверия к корректности бэкенд-системы. Основные результаты:</text:p>
      <text:p text:style-name="Default">все 64 активных тестов проходят успешно;</text:p>
      <text:p text:style-name="Default">покрыты 7 микросервисов на уровне unit-тестов;</text:p>
      <text:p text:style-name="Default">проверены 7 правил совместимости компонентов ПК (23 теста);</text:p>
      <text:p text:style-name="Default">11 архитектурных тестов подтверждают соблюдение Clean Architecture;</text:p>
      <text:p text:style-name="Default">интеграционные тесты проверяют HTTP-эндпоинты и gRPC-взаимодействие;</text:p>
      <text:p text:style-name="Default">контрактные тесты валидируют соответствие API ожиданиям фронтенда;</text:p>
      <text:p text:style-name="Default">тесты изолированы друг от друга через in-memory базы данных.</text:p>
      <text:p text:style-name="Default">Автоматизация тестирования является неотъемлемой частью процесса разработки проекта и обеспечивает возможность безопасного внесения изменений в кодовую базу с минимальным риском регрессий.</text:p>
    </office:text>
  </office:body>
</office:document-content>
</file>

<file path=meta.xml><?xml version="1.0" encoding="utf-8"?>
<office:document-meta xmlns:office="urn:oasis:names:tc:opendocument:xmlns:office:1.0" xmlns:meta="urn:oasis:names:tc:opendocument:xmlns:meta:1.0" office:version="1.2">
  <office:meta>
    <meta:generator>GoldPC Report Generator</meta:generator>
  </office:meta>
</office:document-meta>
</file>