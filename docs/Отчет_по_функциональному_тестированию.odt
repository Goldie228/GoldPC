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http://www.w3.org/1999/XSL/Format" xmlns:xlink="http://www.w3.org/1999/xlink" office:version="1.2">
  <office:automatic-styles>
    <style:page-layout style:name="GoldPC-PL">
      <style:page-layout-properties fo:page-width="21.0cm" fo:page-height="29.7cm" fo:margin-top="2.0cm" fo:margin-bottom="2.0cm" fo:margin-left="3.0cm" fo:margin-right="1.5cm" style:print-orientation="portrait"/>
    </style:page-layout>
    <style:style style:name="Default" style:family="paragraph" style:default-outline-level="-1">
      <style:paragraph-properties fo:text-align="justify" fo:margin-top="0" fo:margin-bottom="0" style:line-height="1" style:line-spacing="1"/>
      <style:text-properties style:font-name="Times New Roman" fo:font-size="14pt" fo:color="#000000"/>
    </style:style>
    <style:style style:name="H1" style:family="paragraph" style:parent-style-name="Default" style:default-outline-level="-1">
      <style:paragraph-properties fo:text-align="center" fo:margin-top="0.7cm" fo:margin-bottom="0.3cm"/>
      <style:text-properties style:font-name="Times New Roman" fo:font-size="16pt" fo:color="#000000"/>
    </style:style>
    <style:style style:name="H2" style:family="paragraph" style:parent-style-name="Default" style:default-outline-level="-1">
      <style:paragraph-properties fo:text-align="left" fo:margin-top="0.7cm" fo:margin-bottom="0.3cm"/>
      <style:text-properties style:font-name="Times New Roman" fo:font-size="14pt" fo:color="#000000"/>
    </style:style>
    <style:style style:name="Title" style:family="paragraph" style:parent-style-name="Default" style:default-outline-level="-1">
      <style:paragraph-properties fo:text-align="center" fo:margin-top="0.5cm" fo:margin-bottom="0.3cm"/>
      <style:text-properties style:font-name="Times New Roman" fo:font-size="16pt" fo:color="#000000"/>
    </style:style>
    <style:style style:name="Cell" style:family="paragraph" style:parent-style-name="Default" style:default-outline-level="-1">
      <style:paragraph-properties fo:text-align="left" fo:margin-top="0" fo:margin-bottom="0" fo:margin-left="0.2cm"/>
      <style:text-properties style:font-name="Times New Roman" fo:font-size="12pt"/>
    </style:style>
    <style:style style:name="CellH" style:family="paragraph" style:parent-style-name="Default" style:default-outline-level="-1">
      <style:paragraph-properties fo:text-align="center" fo:margin-top="0" fo:margin-bottom="0" fo:margin-left="0.2cm"/>
      <style:text-properties style:font-name="Times New Roman" fo:font-size="12pt"/>
    </style:style>
    <style:style style:name="T1" style:family="table">
      <style:table-properties fo:border="0.05pt solid #000000" style:table-layout="fixed"/>
    </style:style>
    <style:style style:name="C1" style:family="table-column">
      <style:table-column-properties fo:break-before="auto" style:column-width="auto"/>
    </style:style>
  </office:automatic-styles>
  <office:body>
    <office:text>
      <text:p text:style-name="Title">ГОСУДАРСТВЕННОЕ УЧРЕЖДЕНИЕ ОБРАЗОВАНИЯ</text:p>
      <text:p text:style-name="Title">"МИНСКИЙ ГОСУДАРСТВЕННЫЙ КОЛЛЕДЖ</text:p>
      <text:p text:style-name="Title">ЭЛЕКТРОНИКИ"</text:p>
      <text:p text:style-name="Title">ОТЧЁТ</text:p>
      <text:p text:style-name="Title">ПО ФУНКЦИОНАЛЬНОМУ ТЕСТИРОВАНИЮ</text:p>
      <text:p text:style-name="Title">ПРОЕКТА "GoldPC"</text:p>
      <text:p text:style-name="Title">2026</text:p>
      <text:p text:style-name="H1">СОДЕРЖАНИЕ</text:p>
      <text:p text:style-name="Default">1. Общие сведения о проекте</text:p>
      <text:p text:style-name="Default">2. Объект тестирования</text:p>
      <text:p text:style-name="Default">3. Методы и средства тестирования</text:p>
      <text:p text:style-name="Default">4. Результаты функционального тестирования</text:p>
      <text:p text:style-name="Default">    4.1. Сервис аутентификации (AuthService)</text:p>
      <text:p text:style-name="Default">    4.2. Сервис каталога (CatalogService)</text:p>
      <text:p text:style-name="Default">    4.3. Сервис заказов (OrdersService)</text:p>
      <text:p text:style-name="Default">    4.4. Сервис сервисных заявок (ServicesService)</text:p>
      <text:p text:style-name="Default">    4.5. Сервис гарантийного обслуживания (WarrantyService)</text:p>
      <text:p text:style-name="Default">    4.6. Сервис сборки ПК (PCBuilderService)</text:p>
      <text:p text:style-name="Default">5. Архитектурные тесты</text:p>
      <text:p text:style-name="Default">6. Интеграционные тесты</text:p>
      <text:p text:style-name="Default">7. Контрактные тесты</text:p>
      <text:p text:style-name="Default">8. Выводы и рекомендации</text:p>
      <text:p text:style-name="Default"><text:s text:c="1"/></text:p>
      <text:p text:style-name="H1">1. Общие сведения о проекте</text:p>
      <text:p text:style-name="Default">Проект "GoldPC" представляет собой интернет-магазин персональных компьютеров с функционалом конфигуратора сборки ПК, каталогом товаров, системой заказов, сервисным обслуживанием и гарантийным обслуживанием. Система построена на архитектуре микросервисов и включает следующие компоненты:</text:p>
      <text:p text:style-name="Default">AuthService -- сервис аутентификации и авторизации пользователей;</text:p>
      <text:p text:style-name="Default">CatalogService -- сервис каталога товаров с фильтрацией и поиском;</text:p>
      <text:p text:style-name="Default">OrdersService -- сервис управления заказами;</text:p>
      <text:p text:style-name="Default">ServicesService -- сервис сервисных заявок и ремонта;</text:p>
      <text:p text:style-name="Default">WarrantyService -- сервис гарантийного обслуживания;</text:p>
      <text:p text:style-name="Default">PCBuilderService -- сервис конфигуратора сборки ПК с проверкой совместимости;</text:p>
      <text:p text:style-name="Default">GoldPC.Api -- API-шлюз (gateway) для маршрутизации запросов.</text:p>
      <text:p text:style-name="Default">Стек технологий: ASP.NET Core 8 (бэкенд), React 19 + Vite (фронтенд), PostgreSQL (база данных), gRPC (межсервисное взаимодействие), Redis (кэширование), RabbitMQ (очередь сообщений).</text:p>
      <text:p text:style-name="Default"><text:s text:c="1"/></text:p>
      <text:p text:style-name="H1">2. Объект тестирования</text:p>
      <text:p text:style-name="Default">Объектом тестирования является бэкендная часть системы, представленная микросервисами, реализующими бизнес-логику приложения. Функциональное тестирование проводилось на уровне модульных тестов для каждого микросервиса, а также на уровне интеграционных тестов для проверки взаимодействия между компонентами.</text:p>
      <text:p text:style-name="Default">Перечень тестируемых функциональных областей:</text:p>
      <text:p text:style-name="Default">регистрация и аутентификация пользователей;</text:p>
      <text:p text:style-name="Default">управление JWT-токенами и смена пароля;</text:p>
      <text:p text:style-name="Default">каталог товаров с фильтрацией по категории, цене, производителю;</text:p>
      <text:p text:style-name="Default">поиск товаров по ключевому слову и артикулу (SKU);</text:p>
      <text:p text:style-name="Default">CRUD-операции с товарами (создание, чтение, обновление, удаление);</text:p>
      <text:p text:style-name="Default">создание, отслеживание и отмена заказов;</text:p>
      <text:p text:style-name="Default">управление статусами заказов с валидацией переходов;</text:p>
      <text:p text:style-name="Default">обработка платежей и возврат средств;</text:p>
      <text:p text:style-name="Default">создание и обработка сервисных заявок;</text:p>
      <text:p text:style-name="Default">назначение мастеров и отслеживание статуса ремонта;</text:p>
      <text:p text:style-name="Default">управление гарантийными картами и рекламациями;</text:p>
      <text:p text:style-name="Default">проверка совместимости компонентов ПК (сокет, тип памяти, мощность БП);</text:p>
      <text:p text:style-name="Default">конфигурация сборки ПК с пагинацией и share-токенами.</text:p>
      <text:p text:style-name="Default"><text:s text:c="1"/></text:p>
      <text:p text:style-name="H1">3. Методы и средства тестирования</text:p>
      <text:p text:style-name="Default">Для функционального тестирования проекта использовались следующие методы и средства:</text:p>
      <text:p text:style-name="Default">Методы тестирования:</text:p>
      <text:p text:style-name="Default">модульные тесты (unit tests) -- проверка отдельных методов сервисов в изоляции;</text:p>
      <text:p text:style-name="Default">интеграционные тесты -- проверка взаимодействия компонентов через HTTP-запросы;</text:p>
      <text:p text:style-name="Default">контрактные тесты -- верификация соответствия API контракту потребителя.</text:p>
      <text:p text:style-name="Default">Средства тестирования:</text:p>
      <text:p text:style-name="Default">xUnit -- фреймворк для написания и запуска тестов;</text:p>
      <text:p text:style-name="Default">FluentAssertions -- библиотека для читаемых утверждений (assertions);</text:p>
      <text:p text:style-name="Default">Moq -- фреймворк для создания мок-объектов (mocks);</text:p>
      <text:p text:style-name="Default">AutoFixture -- автоматическая генерация тестовых данных;</text:p>
      <text:p text:style-name="Default">Microsoft.EntityFrameworkCore.InMemory -- in-memory БД для изоляции тестов;</text:p>
      <text:p text:style-name="Default">WebApplicationFactory -- тестирование HTTP-эндпоинтов без реального сервера;</text:p>
      <text:p text:style-name="Default">PactNet -- контрактное тестирование (consumer-driven contracts);</text:p>
      <text:p text:style-name="Default">NetArchTest.Rules -- проверка архитектурных ограничений.</text:p>
      <text:p text:style-name="Default">Принципы написания тестов (FIRST):</text:p>
      <text:p text:style-name="Default">Fast -- тесты выполняются быстро без внешних зависимостей;</text:p>
      <text:p text:style-name="Default">Independent -- каждый тест независим и создаёт свои данные;</text:p>
      <text:p text:style-name="Default">Repeatable -- одинаковый результат при каждом запуске;</text:p>
      <text:p text:style-name="Default">Self-validating -- автоматический assert без ручной проверки;</text:p>
      <text:p text:style-name="Default">Timely -- тесты пишутся вместе с кодом.</text:p>
      <text:p text:style-name="Default"><text:s text:c="1"/></text:p>
      <text:p text:style-name="H1">4. Результаты функционального тестирования</text:p>
      <text:p text:style-name="H2">4.1. Сервис аутентификации (AuthService)</text:p>
      <text:p text:style-name="Default">Тесты AuthService проверяют корректность регистрации пользователей, аутентификации (входа), управления токенами и смены пароля. Используется in-memory база данных и моки внешних сервисов (JWT-генератор, email-сервис, кэш токенов)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Тест</text:p>
          </table:table-cell>
          <table:table-cell table:style-name="C1">
            <text:p text:style-name="CellH">Описание</text:p>
          </table:table-cell>
          <table:table-cell table:style-name="C1">
            <text:p text:style-name="CellH">Результат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Register_ValidRequest_ShouldCreateUser</text:p>
          </table:table-cell>
          <table:table-cell table:style-name="C1">
            <text:p text:style-name="Cell">Регистрация с валидными данными -- пользователь создаётся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Register_DuplicateEmail_ShouldReturnError</text:p>
          </table:table-cell>
          <table:table-cell table:style-name="C1">
            <text:p text:style-name="Cell">Повторная регистрация с тем же email -- ошибка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3</text:p>
          </table:table-cell>
          <table:table-cell table:style-name="C1">
            <text:p text:style-name="Cell">Login_ValidCredentials_ShouldReturnTokens</text:p>
          </table:table-cell>
          <table:table-cell table:style-name="C1">
            <text:p text:style-name="Cell">Вход с правильными данными -- возвращаются токены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4</text:p>
          </table:table-cell>
          <table:table-cell table:style-name="C1">
            <text:p text:style-name="Cell">Login_InvalidPassword_ShouldReturnError</text:p>
          </table:table-cell>
          <table:table-cell table:style-name="C1">
            <text:p text:style-name="Cell">Вход с неверным паролем -- ошибка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5</text:p>
          </table:table-cell>
          <table:table-cell table:style-name="C1">
            <text:p text:style-name="Cell">GetUserById_ExistingUser_ShouldReturnUser</text:p>
          </table:table-cell>
          <table:table-cell table:style-name="C1">
            <text:p text:style-name="Cell">Получение пользователя по ID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6</text:p>
          </table:table-cell>
          <table:table-cell table:style-name="C1">
            <text:p text:style-name="Cell">ChangePassword_CorrectOldPassword_ShouldChange</text:p>
          </table:table-cell>
          <table:table-cell table:style-name="C1">
            <text:p text:style-name="Cell">Смена пароля -- новый пароль принимается</text:p>
          </table:table-cell>
          <table:table-cell table:style-name="C1">
            <text:p text:style-name="Cell">Пройден</text:p>
          </table:table-cell>
        </table:table-row>
      </table:table>
      <text:p text:style-name="Default">Всего тестов: 6. Пройдено: 6. Не пройдено: 0.</text:p>
      <text:p text:style-name="H2">4.2. Сервис каталога (CatalogService)</text:p>
      <text:p text:style-name="Default">Тесты CatalogService покрывают основные операции с каталогом товаров: получение товара по ID и SKU, фильтрацию по категории, цене, наличию, поисковому запросу, производителю, а также пагинацию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Группа тестов</text:p>
          </table:table-cell>
          <table:table-cell table:style-name="C1">
            <text:p text:style-name="CellH">Кол-во</text:p>
          </table:table-cell>
          <table:table-cell table:style-name="C1">
            <text:p text:style-name="CellH">Описание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GetProductById</text:p>
          </table:table-cell>
          <table:table-cell table:style-name="C1">
            <text:p text:style-name="Cell">5</text:p>
          </table:table-cell>
          <table:table-cell table:style-name="C1">
            <text:p text:style-name="Cell">Существующий, несуществующий, неактивный, с изображениями, с рейтингом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GetProducts (Filtering)</text:p>
          </table:table-cell>
          <table:table-cell table:style-name="C1">
            <text:p text:style-name="Cell">10</text:p>
          </table:table-cell>
          <table:table-cell table:style-name="C1">
            <text:p text:style-name="Cell">Фильтрация по категории, цене, наличию, поиску, избранному, производителю, пустой результат</text:p>
          </table:table-cell>
        </table:table-row>
        <table:table-row>
          <table:table-cell table:style-name="C1">
            <text:p text:style-name="Cell">3</text:p>
          </table:table-cell>
          <table:table-cell table:style-name="C1">
            <text:p text:style-name="Cell">GetProductBySku</text:p>
          </table:table-cell>
          <table:table-cell table:style-name="C1">
            <text:p text:style-name="Cell">2</text:p>
          </table:table-cell>
          <table:table-cell table:style-name="C1">
            <text:p text:style-name="Cell">Поиск по артикулу: найден и не найден</text:p>
          </table:table-cell>
        </table:table-row>
        <table:table-row>
          <table:table-cell table:style-name="C1">
            <text:p text:style-name="Cell">4</text:p>
          </table:table-cell>
          <table:table-cell table:style-name="C1">
            <text:p text:style-name="Cell">CreateProduct</text:p>
          </table:table-cell>
          <table:table-cell table:style-name="C1">
            <text:p text:style-name="Cell">3</text:p>
          </table:table-cell>
          <table:table-cell table:style-name="C1">
            <text:p text:style-name="Cell">Создание товара: валидные данные, дублирование SKU, категория по slug</text:p>
          </table:table-cell>
        </table:table-row>
        <table:table-row>
          <table:table-cell table:style-name="C1">
            <text:p text:style-name="Cell">5</text:p>
          </table:table-cell>
          <table:table-cell table:style-name="C1">
            <text:p text:style-name="Cell">DeleteProduct</text:p>
          </table:table-cell>
          <table:table-cell table:style-name="C1">
            <text:p text:style-name="Cell">2</text:p>
          </table:table-cell>
          <table:table-cell table:style-name="C1">
            <text:p text:style-name="Cell">Удаление: существует и не существует</text:p>
          </table:table-cell>
        </table:table-row>
        <table:table-row>
          <table:table-cell table:style-name="C1">
            <text:p text:style-name="Cell">6</text:p>
          </table:table-cell>
          <table:table-cell table:style-name="C1">
            <text:p text:style-name="Cell">GetProductsByIds</text:p>
          </table:table-cell>
          <table:table-cell table:style-name="C1">
            <text:p text:style-name="Cell">2</text:p>
          </table:table-cell>
          <table:table-cell table:style-name="C1">
            <text:p text:style-name="Cell">Получение списка товаров по IDs</text:p>
          </table:table-cell>
        </table:table-row>
      </table:table>
      <text:p text:style-name="Default">Всего тестов: 24. Пройдено: 24. Не пройдено: 0.</text:p>
      <text:p text:style-name="H2">4.3. Сервис заказов (OrdersService)</text:p>
      <text:p text:style-name="Default">Тесты OrdersService проверяют жизненный цикл заказа: создание, обновление статуса, отмену, пагинацию и фильтрацию по пользователю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Тест</text:p>
          </table:table-cell>
          <table:table-cell table:style-name="C1">
            <text:p text:style-name="CellH">Описание</text:p>
          </table:table-cell>
          <table:table-cell table:style-name="C1">
            <text:p text:style-name="CellH">Результат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CreateOrder_ValidRequest</text:p>
          </table:table-cell>
          <table:table-cell table:style-name="C1">
            <text:p text:style-name="Cell">Создание заказа -- номер ORD-xxx, статус New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UpdateStatus_NewToProcessing</text:p>
          </table:table-cell>
          <table:table-cell table:style-name="C1">
            <text:p text:style-name="Cell">Переход статуса New -&gt; Processing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3</text:p>
          </table:table-cell>
          <table:table-cell table:style-name="C1">
            <text:p text:style-name="Cell">CancelOrder_InNewStatus</text:p>
          </table:table-cell>
          <table:table-cell table:style-name="C1">
            <text:p text:style-name="Cell">Отмена заказа в статусе New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4</text:p>
          </table:table-cell>
          <table:table-cell table:style-name="C1">
            <text:p text:style-name="Cell">GetAll_PagedResults</text:p>
          </table:table-cell>
          <table:table-cell table:style-name="C1">
            <text:p text:style-name="Cell">Пагинация: 15 заказов, страница по 10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5</text:p>
          </table:table-cell>
          <table:table-cell table:style-name="C1">
            <text:p text:style-name="Cell">GetByUserId_OnlyUserOrders</text:p>
          </table:table-cell>
          <table:table-cell table:style-name="C1">
            <text:p text:style-name="Cell">Фильтрация по пользователю</text:p>
          </table:table-cell>
          <table:table-cell table:style-name="C1">
            <text:p text:style-name="Cell">Пройден</text:p>
          </table:table-cell>
        </table:table-row>
      </table:table>
      <text:p text:style-name="Default">Всего тестов: 5. Пройдено: 5. Не пройдено: 0.</text:p>
      <text:p text:style-name="H2">4.4. Сервис сервисных заявок (ServicesService)</text:p>
      <text:p text:style-name="Default">Тесты ServicesService проверяют создание заявок на ремонт, назначение мастеров, завершение работ и отмену заявок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Тест</text:p>
          </table:table-cell>
          <table:table-cell table:style-name="C1">
            <text:p text:style-name="CellH">Описание</text:p>
          </table:table-cell>
          <table:table-cell table:style-name="C1">
            <text:p text:style-name="CellH">Результат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CreateServiceRequest_Valid</text:p>
          </table:table-cell>
          <table:table-cell table:style-name="C1">
            <text:p text:style-name="Cell">Создание заявки -- номер SR-xxx, статус Submitted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AssignMaster_NewRequest</text:p>
          </table:table-cell>
          <table:table-cell table:style-name="C1">
            <text:p text:style-name="Cell">Назначение мастера -- статус InProgress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3</text:p>
          </table:table-cell>
          <table:table-cell table:style-name="C1">
            <text:p text:style-name="Cell">Complete_ServiceRequest</text:p>
          </table:table-cell>
          <table:table-cell table:style-name="C1">
            <text:p text:style-name="Cell">Завершение ремонта -- статус ReadyForPickup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4</text:p>
          </table:table-cell>
          <table:table-cell table:style-name="C1">
            <text:p text:style-name="Cell">Cancel_NewRequest</text:p>
          </table:table-cell>
          <table:table-cell table:style-name="C1">
            <text:p text:style-name="Cell">Отмена заявки в статусе Submitted</text:p>
          </table:table-cell>
          <table:table-cell table:style-name="C1">
            <text:p text:style-name="Cell">Пройден</text:p>
          </table:table-cell>
        </table:table-row>
      </table:table>
      <text:p text:style-name="Default">Всего тестов: 4. Пройдено: 4. Не пройдено: 0.</text:p>
      <text:p text:style-name="H2">4.5. Сервис гарантийного обслуживания (WarrantyService)</text:p>
      <text:p text:style-name="Default">Тесты WarrantyService проверяют создание гарантийных карт и рекламаций, обновление статусов, аннулирование и автоматическое окончание сроков гарантии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Тест</text:p>
          </table:table-cell>
          <table:table-cell table:style-name="C1">
            <text:p text:style-name="CellH">Описание</text:p>
          </table:table-cell>
          <table:table-cell table:style-name="C1">
            <text:p text:style-name="CellH">Результат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CreateClaim_Valid</text:p>
          </table:table-cell>
          <table:table-cell table:style-name="C1">
            <text:p text:style-name="Cell">Создание рекламации -- номер WC-год-xxx, статус New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UpdateClaimStatus</text:p>
          </table:table-cell>
          <table:table-cell table:style-name="C1">
            <text:p text:style-name="Cell">Обновление статуса + запись в историю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3</text:p>
          </table:table-cell>
          <table:table-cell table:style-name="C1">
            <text:p text:style-name="Cell">CreateCard_Valid</text:p>
          </table:table-cell>
          <table:table-cell table:style-name="C1">
            <text:p text:style-name="Cell">Создание гарантийной карты -- номер W-год-xxx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4</text:p>
          </table:table-cell>
          <table:table-cell table:style-name="C1">
            <text:p text:style-name="Cell">AnnulCard_Existing</text:p>
          </table:table-cell>
          <table:table-cell table:style-name="C1">
            <text:p text:style-name="Cell">Аннулирование с указанием причины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5</text:p>
          </table:table-cell>
          <table:table-cell table:style-name="C1">
            <text:p text:style-name="Cell">ExpireWarranties</text:p>
          </table:table-cell>
          <table:table-cell table:style-name="C1">
            <text:p text:style-name="Cell">Автоматическое окончание для просроченных карт</text:p>
          </table:table-cell>
          <table:table-cell table:style-name="C1">
            <text:p text:style-name="Cell">Пройден</text:p>
          </table:table-cell>
        </table:table-row>
      </table:table>
      <text:p text:style-name="Default">Всего тестов: 5. Пройдено: 5. Не пройдено: 0.</text:p>
      <text:p text:style-name="H2">4.6. Сервис сборки ПК (PCBuilderService)</text:p>
      <text:p text:style-name="Default">Тесты PCBuilderService делятся на две группы: проверка совместимости компонентов (CompatibilityService) и управление конфигурациями сборки (ConfigurationService)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Группа правил</text:p>
          </table:table-cell>
          <table:table-cell table:style-name="C1">
            <text:p text:style-name="CellH">Кол-во</text:p>
          </table:table-cell>
          <table:table-cell table:style-name="C1">
            <text:p text:style-name="CellH">Описание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CPU &lt;-&gt; Motherboard Socket</text:p>
          </table:table-cell>
          <table:table-cell table:style-name="C1">
            <text:p text:style-name="Cell">4</text:p>
          </table:table-cell>
          <table:table-cell table:style-name="C1">
            <text:p text:style-name="Cell">Несовместимый сокет, совместимый, регистронезависимый, отсутствие данных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RAM &lt;-&gt; Motherboard MemoryType</text:p>
          </table:table-cell>
          <table:table-cell table:style-name="C1">
            <text:p text:style-name="Cell">4</text:p>
          </table:table-cell>
          <table:table-cell table:style-name="C1">
            <text:p text:style-name="Cell">Несовместимый тип, совместимый, превышение скорости, отсутствие типа</text:p>
          </table:table-cell>
        </table:table-row>
        <table:table-row>
          <table:table-cell table:style-name="C1">
            <text:p text:style-name="Cell">3</text:p>
          </table:table-cell>
          <table:table-cell table:style-name="C1">
            <text:p text:style-name="Cell">Cooler &lt;-&gt; CPU SupportedSockets</text:p>
          </table:table-cell>
          <table:table-cell table:style-name="C1">
            <text:p text:style-name="Cell">3</text:p>
          </table:table-cell>
          <table:table-cell table:style-name="C1">
            <text:p text:style-name="Cell">Неподдерживаемый сокет, совместимый, недостаточный TDP</text:p>
          </table:table-cell>
        </table:table-row>
        <table:table-row>
          <table:table-cell table:style-name="C1">
            <text:p text:style-name="Cell">4</text:p>
          </table:table-cell>
          <table:table-cell table:style-name="C1">
            <text:p text:style-name="Cell">PSU &lt;-&gt; Configuration Power</text:p>
          </table:table-cell>
          <table:table-cell table:style-name="C1">
            <text:p text:style-name="Cell">5</text:p>
          </table:table-cell>
          <table:table-cell table:style-name="C1">
            <text:p text:style-name="Cell">Недостаточная мощность, достаточная, расчёт потребления, рекомендованная, предупреждение</text:p>
          </table:table-cell>
        </table:table-row>
        <table:table-row>
          <table:table-cell table:style-name="C1">
            <text:p text:style-name="Cell">5</text:p>
          </table:table-cell>
          <table:table-cell table:style-name="C1">
            <text:p text:style-name="Cell">Bottleneck Detection</text:p>
          </table:table-cell>
          <table:table-cell table:style-name="C1">
            <text:p text:style-name="Cell">1</text:p>
          </table:table-cell>
          <table:table-cell table:style-name="C1">
            <text:p text:style-name="Cell">Обнаружение при ratio &gt; 2.0</text:p>
          </table:table-cell>
        </table:table-row>
        <table:table-row>
          <table:table-cell table:style-name="C1">
            <text:p text:style-name="Cell">6</text:p>
          </table:table-cell>
          <table:table-cell table:style-name="C1">
            <text:p text:style-name="Cell">Комбинированные тесты</text:p>
          </table:table-cell>
          <table:table-cell table:style-name="C1">
            <text:p text:style-name="Cell">3</text:p>
          </table:table-cell>
          <table:table-cell table:style-name="C1">
            <text:p text:style-name="Cell">Все совместимы, множественные несоответствия, happy path</text:p>
          </table:table-cell>
        </table:table-row>
        <table:table-row>
          <table:table-cell table:style-name="C1">
            <text:p text:style-name="Cell">7</text:p>
          </table:table-cell>
          <table:table-cell table:style-name="C1">
            <text:p text:style-name="Cell">ConfigurationService CRUD</text:p>
          </table:table-cell>
          <table:table-cell table:style-name="C1">
            <text:p text:style-name="Cell">10</text:p>
          </table:table-cell>
          <table:table-cell table:style-name="C1">
            <text:p text:style-name="Cell">Создание, чтение, обновление, удаление, пагинация, share-токены, права доступа</text:p>
          </table:table-cell>
        </table:table-row>
      </table:table>
      <text:p text:style-name="Default">Всего тестов совместимости: 20. Всего тестов конфигурации: 10. Пройдено: 30. Не пройдено: 0.</text:p>
      <text:p text:style-name="Default"><text:s text:c="1"/></text:p>
      <text:p text:style-name="H1">5. Архитектурные тесты</text:p>
      <text:p text:style-name="Default">Архитектурные тесты проверяют соблюдение принципов чистой архитектуры (Clean Architecture) в проекте. Используется библиотека NetArchTest.Rules для анализа зависимостей между сборками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Тест</text:p>
          </table:table-cell>
          <table:table-cell table:style-name="C1">
            <text:p text:style-name="CellH">Описание</text:p>
          </table:table-cell>
          <table:table-cell table:style-name="C1">
            <text:p text:style-name="CellH">Результат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Should_Not_Have_Circular_Dependencies</text:p>
          </table:table-cell>
          <table:table-cell table:style-name="C1">
            <text:p text:style-name="Cell">Проверка отсутствия циклических зависимостей (DFS)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Core_Should_Not_Depend_On_Infrastructure</text:p>
          </table:table-cell>
          <table:table-cell table:style-name="C1">
            <text:p text:style-name="Cell">Models/Entities не зависит от Repositories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3</text:p>
          </table:table-cell>
          <table:table-cell table:style-name="C1">
            <text:p text:style-name="Cell">Controllers_Should_Not_Depend_On_Repositories</text:p>
          </table:table-cell>
          <table:table-cell table:style-name="C1">
            <text:p text:style-name="Cell">Контроллеры не зависимы от репозиториев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4</text:p>
          </table:table-cell>
          <table:table-cell table:style-name="C1">
            <text:p text:style-name="Cell">ControllersShouldNotReferenceRepositories</text:p>
          </table:table-cell>
          <table:table-cell table:style-name="C1">
            <text:p text:style-name="Cell">Контроллеры не ссылаются на репозитории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5</text:p>
          </table:table-cell>
          <table:table-cell table:style-name="C1">
            <text:p text:style-name="Cell">ServicesShouldHaveInterfaces</text:p>
          </table:table-cell>
          <table:table-cell table:style-name="C1">
            <text:p text:style-name="Cell">Все сервисы реализуют интерфейс (DIP)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6</text:p>
          </table:table-cell>
          <table:table-cell table:style-name="C1">
            <text:p text:style-name="Cell">ServiceInterfacesFollowNamingConvention</text:p>
          </table:table-cell>
          <table:table-cell table:style-name="C1">
            <text:p text:style-name="Cell">Интерфейсы -- I{ServiceName}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7</text:p>
          </table:table-cell>
          <table:table-cell table:style-name="C1">
            <text:p text:style-name="Cell">DomainEntitiesShouldBeSealedOrProtected</text:p>
          </table:table-cell>
          <table:table-cell table:style-name="C1">
            <text:p text:style-name="Cell">Сущности SharedKernel -- sealed/abstract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8</text:p>
          </table:table-cell>
          <table:table-cell table:style-name="C1">
            <text:p text:style-name="Cell">EntitiesSealedOrAbstractOrInheritBase</text:p>
          </table:table-cell>
          <table:table-cell table:style-name="C1">
            <text:p text:style-name="Cell">Сущности сервисов -- sealed/abstract/BaseEntity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9</text:p>
          </table:table-cell>
          <table:table-cell table:style-name="C1">
            <text:p text:style-name="Cell">RepositoriesShouldHaveInterfaces</text:p>
          </table:table-cell>
          <table:table-cell table:style-name="C1">
            <text:p text:style-name="Cell">Репозитории реализуют интерфейсы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10</text:p>
          </table:table-cell>
          <table:table-cell table:style-name="C1">
            <text:p text:style-name="Cell">RepositoryInterfacesFollowNaming</text:p>
          </table:table-cell>
          <table:table-cell table:style-name="C1">
            <text:p text:style-name="Cell">Интерфейсы -- I{RepositoryName}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11</text:p>
          </table:table-cell>
          <table:table-cell table:style-name="C1">
            <text:p text:style-name="Cell">ControllersInControllersNamespace</text:p>
          </table:table-cell>
          <table:table-cell table:style-name="C1">
            <text:p text:style-name="Cell">Контроллеры в пространстве имён Controllers</text:p>
          </table:table-cell>
          <table:table-cell table:style-name="C1">
            <text:p text:style-name="Cell">Пройден</text:p>
          </table:table-cell>
        </table:table-row>
      </table:table>
      <text:p text:style-name="Default">Всего архитектурных тестов: 11. Пройдено: 11. Не пройдено: 0.</text:p>
      <text:p text:style-name="Default"><text:s text:c="1"/></text:p>
      <text:p text:style-name="H1">6. Интеграционные тесты</text:p>
      <text:p text:style-name="Default">Интеграционные тесты проверяют взаимодействие между компонентами системы через HTTP-запросы с использованием WebApplicationFactory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Тест</text:p>
          </table:table-cell>
          <table:table-cell table:style-name="C1">
            <text:p text:style-name="CellH">Описание</text:p>
          </table:table-cell>
          <table:table-cell table:style-name="C1">
            <text:p text:style-name="CellH">Результат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CatalogApi: GetProducts_ReturnsSuccess</text:p>
          </table:table-cell>
          <table:table-cell table:style-name="C1">
            <text:p text:style-name="Cell">GET /api/v1/catalog/products -- 200 OK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ProductsApi: GetProducts_ReturnsOk</text:p>
          </table:table-cell>
          <table:table-cell table:style-name="C1">
            <text:p text:style-name="Cell">Доступность БД через DatabaseFixture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3</text:p>
          </table:table-cell>
          <table:table-cell table:style-name="C1">
            <text:p text:style-name="Cell">ProductsApi: ResetDatabase_ClearsData</text:p>
          </table:table-cell>
          <table:table-cell table:style-name="C1">
            <text:p text:style-name="Cell">Сброс данных между тестами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4</text:p>
          </table:table-cell>
          <table:table-cell table:style-name="C1">
            <text:p text:style-name="Cell">ProductsApi: MultipleTests_Isolated</text:p>
          </table:table-cell>
          <table:table-cell table:style-name="C1">
            <text:p text:style-name="Cell">Изоляция данных между тестами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5</text:p>
          </table:table-cell>
          <table:table-cell table:style-name="C1">
            <text:p text:style-name="Cell">ProductsApiWithFixture: GetProducts_Ok</text:p>
          </table:table-cell>
          <table:table-cell table:style-name="C1">
            <text:p text:style-name="Cell">Типизированный ApiFixture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6</text:p>
          </table:table-cell>
          <table:table-cell table:style-name="C1">
            <text:p text:style-name="Cell">CollectionFixture: SharedDatabase</text:p>
          </table:table-cell>
          <table:table-cell table:style-name="C1">
            <text:p text:style-name="Cell">Совместное использование DatabaseFixture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7</text:p>
          </table:table-cell>
          <table:table-cell table:style-name="C1">
            <text:p text:style-name="Cell">OrderStock: CreateOrder_ReserveStock</text:p>
          </table:table-cell>
          <table:table-cell table:style-name="C1">
            <text:p text:style-name="Cell">Создание заказа вызывает gRPC-резервирование</text:p>
          </table:table-cell>
          <table:table-cell table:style-name="C1">
            <text:p text:style-name="Cell">Пройден</text:p>
          </table:table-cell>
        </table:table-row>
      </table:table>
      <text:p text:style-name="Default">Всего интеграционных тестов: 7. Пройдено: 7. Не пройдено: 0.</text:p>
      <text:p text:style-name="Default"><text:s text:c="1"/></text:p>
      <text:p text:style-name="H1">7. Контрактные тесты</text:p>
      <text:p text:style-name="Default">Контрактные тесты проверяют соответствие API провайдера (Catalog API) ожиданиям потребителя (Frontend). Используется PactNet для верификации consumer-driven контрактов.</text:p>
      <table:table table:name="T1" table:style-name="T1" table:column-count="4">
        <table:table-row>
          <table:table-cell table:style-name="C1">
            <text:p text:style-name="CellH">№</text:p>
          </table:table-cell>
          <table:table-cell table:style-name="C1">
            <text:p text:style-name="CellH">Тест</text:p>
          </table:table-cell>
          <table:table-cell table:style-name="C1">
            <text:p text:style-name="CellH">Описание</text:p>
          </table:table-cell>
          <table:table-cell table:style-name="C1">
            <text:p text:style-name="CellH">Результат</text:p>
          </table:table-cell>
        </table:table-row>
        <table:table-row>
          <table:table-cell table:style-name="C1">
            <text:p text:style-name="Cell">1</text:p>
          </table:table-cell>
          <table:table-cell table:style-name="C1">
            <text:p text:style-name="Cell">VerifyPactWithFrontend</text:p>
          </table:table-cell>
          <table:table-cell table:style-name="C1">
            <text:p text:style-name="Cell">Верификация контракта Catalog API с Frontend</text:p>
          </table:table-cell>
          <table:table-cell table:style-name="C1">
            <text:p text:style-name="Cell">Пройден</text:p>
          </table:table-cell>
        </table:table-row>
        <table:table-row>
          <table:table-cell table:style-name="C1">
            <text:p text:style-name="Cell">2</text:p>
          </table:table-cell>
          <table:table-cell table:style-name="C1">
            <text:p text:style-name="Cell">VerifyPactFromBroker (Skip)</text:p>
          </table:table-cell>
          <table:table-cell table:style-name="C1">
            <text:p text:style-name="Cell">Верификация через Pact Broker (CI/CD)</text:p>
          </table:table-cell>
          <table:table-cell table:style-name="C1">
            <text:p text:style-name="Cell">Пропущен</text:p>
          </table:table-cell>
        </table:table-row>
      </table:table>
      <text:p text:style-name="Default">Всего контрактных тестов: 2 (1 активный). Пройдено: 1. Пропущен: 1.</text:p>
      <text:p text:style-name="Default"><text:s text:c="1"/></text:p>
      <text:p text:style-name="H1">8. Выводы и рекомендации</text:p>
      <text:p text:style-name="Default">В ходе функционального тестирования проекта "GoldPC" выполнена комплексная проверка всех микросервисов системы. Результаты:</text:p>
      <table:table table:name="T1" table:style-name="T1" table:column-count="4">
        <table:table-row>
          <table:table-cell table:style-name="C1">
            <text:p text:style-name="CellH">Категория тестов</text:p>
          </table:table-cell>
          <table:table-cell table:style-name="C1">
            <text:p text:style-name="CellH">Количество</text:p>
          </table:table-cell>
          <table:table-cell table:style-name="C1">
            <text:p text:style-name="CellH">Пройдено</text:p>
          </table:table-cell>
          <table:table-cell table:style-name="C1">
            <text:p text:style-name="CellH">Не пройдено</text:p>
          </table:table-cell>
        </table:table-row>
        <table:table-row>
          <table:table-cell table:style-name="C1">
            <text:p text:style-name="Cell">Модульные тесты (микросервисы)</text:p>
          </table:table-cell>
          <table:table-cell table:style-name="C1">
            <text:p text:style-name="Cell">45</text:p>
          </table:table-cell>
          <table:table-cell table:style-name="C1">
            <text:p text:style-name="Cell">45</text:p>
          </table:table-cell>
          <table:table-cell table:style-name="C1">
            <text:p text:style-name="Cell">0</text:p>
          </table:table-cell>
        </table:table-row>
        <table:table-row>
          <table:table-cell table:style-name="C1">
            <text:p text:style-name="Cell">Архитектурные тесты</text:p>
          </table:table-cell>
          <table:table-cell table:style-name="C1">
            <text:p text:style-name="Cell">11</text:p>
          </table:table-cell>
          <table:table-cell table:style-name="C1">
            <text:p text:style-name="Cell">11</text:p>
          </table:table-cell>
          <table:table-cell table:style-name="C1">
            <text:p text:style-name="Cell">0</text:p>
          </table:table-cell>
        </table:table-row>
        <table:table-row>
          <table:table-cell table:style-name="C1">
            <text:p text:style-name="Cell">Интеграционные тесты</text:p>
          </table:table-cell>
          <table:table-cell table:style-name="C1">
            <text:p text:style-name="Cell">7</text:p>
          </table:table-cell>
          <table:table-cell table:style-name="C1">
            <text:p text:style-name="Cell">7</text:p>
          </table:table-cell>
          <table:table-cell table:style-name="C1">
            <text:p text:style-name="Cell">0</text:p>
          </table:table-cell>
        </table:table-row>
        <table:table-row>
          <table:table-cell table:style-name="C1">
            <text:p text:style-name="Cell">Контрактные тесты (активные)</text:p>
          </table:table-cell>
          <table:table-cell table:style-name="C1">
            <text:p text:style-name="Cell">1</text:p>
          </table:table-cell>
          <table:table-cell table:style-name="C1">
            <text:p text:style-name="Cell">1</text:p>
          </table:table-cell>
          <table:table-cell table:style-name="C1">
            <text:p text:style-name="Cell">0</text:p>
          </table:table-cell>
        </table:table-row>
        <table:table-row>
          <table:table-cell table:style-name="C1">
            <text:p text:style-name="Cell">ИТОГО</text:p>
          </table:table-cell>
          <table:table-cell table:style-name="C1">
            <text:p text:style-name="Cell">64</text:p>
          </table:table-cell>
          <table:table-cell table:style-name="C1">
            <text:p text:style-name="Cell">64</text:p>
          </table:table-cell>
          <table:table-cell table:style-name="C1">
            <text:p text:style-name="Cell">0</text:p>
          </table:table-cell>
        </table:table-row>
      </table:table>
      <text:p text:style-name="Default">Общий уровень покрытия функциональности составляет 100% по числу запланированных тестов. Все тесты проходят успешно.</text:p>
      <text:p text:style-name="Default">Рекомендации по дальнейшему развитию тестовой базы:</text:p>
      <text:p text:style-name="Default">добавить интеграционные тесты для AuthService и OrdersService с реальной БД;</text:p>
      <text:p text:style-name="Default">реализовать контрактные тесты для OrdersService и ServicesService;</text:p>
      <text:p text:style-name="Default">добавить end-to-end тесты ключевых пользовательских сценариев;</text:p>
      <text:p text:style-name="Default">настроить автоматический запуск тестов в CI/CD пайплайне;</text:p>
      <text:p text:style-name="Default">добавить измерение покрытия кода (code coverage) с минимальным порогом 70%.</text:p>
    </office:text>
  </office:body>
</office:document-content>
</file>

<file path=meta.xml><?xml version="1.0" encoding="utf-8"?>
<office:document-meta xmlns:office="urn:oasis:names:tc:opendocument:xmlns:office:1.0" xmlns:meta="urn:oasis:names:tc:opendocument:xmlns:meta:1.0" office:version="1.2">
  <office:meta>
    <meta:generator>GoldPC Report Generator</meta:generator>
  </office:meta>
</office:document-meta>
</file>